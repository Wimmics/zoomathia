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7.39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1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2.4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incip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Langu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Chemin complet</text:p>
          </table:table-cell>
        </table:table-row>
        <table:table-row table:style-name="ro1">
          <table:table-cell office:value-type="string" calcext:value-type="string">
            <text:p>tlg0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14.tlg001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58.7 Ko</text:p>
          </table:table-cell>
          <table:table-cell office:value-type="string" calcext:value-type="string">
            <text:p>./Named_entity_recognition/data/tlg0614/tlg0614.tlg001.1st1K-grc1.xml</text:p>
          </table:table-cell>
        </table:table-row>
        <table:table-row table:style-name="ro1">
          <table:table-cell office:value-type="string" calcext:value-type="string">
            <text:p>phi0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5.phi001.perseus-eng1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2.6 Ko</text:p>
          </table:table-cell>
          <table:table-cell office:value-type="string" calcext:value-type="string">
            <text:p>./Named_entity_recognition/data/phi0975/phi0975.phi001.perseus-eng1.xml</text:p>
          </table:table-cell>
        </table:table-row>
        <table:table-row table:style-name="ro1">
          <table:table-cell office:value-type="string" calcext:value-type="string">
            <text:p>phi0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5.phi001.perseus-lat1-p5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3.9 Ko</text:p>
          </table:table-cell>
          <table:table-cell office:value-type="string" calcext:value-type="string">
            <text:p>./Named_entity_recognition/data/phi0975/phi0975.phi001.perseus-lat1-p5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6.tlg001.perseus-grc2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284.5 Ko</text:p>
          </table:table-cell>
          <table:table-cell office:value-type="string" calcext:value-type="string">
            <text:p>./Named_entity_recognition/data/tlg0016/tlg001/tlg0016.tlg001.perseus-grc2.xml</text:p>
          </table:table-cell>
        </table:table-row>
        <table:table-row table:style-name="ro1">
          <table:table-cell office:value-type="string" calcext:value-type="string">
            <text:p>tlg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0.tlg002.perseus-grc2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0.0 Ko</text:p>
          </table:table-cell>
          <table:table-cell office:value-type="string" calcext:value-type="string">
            <text:p>./Named_entity_recognition/data/tlg0020/tlg002/tlg0020.tlg002.perseus-grc2.xml</text:p>
          </table:table-cell>
        </table:table-row>
        <table:table-row table:style-name="ro1">
          <table:table-cell office:value-type="string" calcext:value-type="string">
            <text:p>tlg0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9.tlg001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656.0 Ko</text:p>
          </table:table-cell>
          <table:table-cell office:value-type="string" calcext:value-type="string">
            <text:p>./Named_entity_recognition/data/tlg0099/tlg0099.tlg001.perseus-grc1.xml</text:p>
          </table:table-cell>
        </table:table-row>
        <table:table-row table:style-name="ro1">
          <table:table-cell office:value-type="string" calcext:value-type="string">
            <text:p>phi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erseus_text_1999.02.013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804.0 Ko</text:p>
          </table:table-cell>
          <table:table-cell office:value-type="string" calcext:value-type="string">
            <text:p>./Named_entity_recognition/data/phi0978/Perseus_text_1999.02.0138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Conrad de Halberstadt</text:p>
          </table:table-cell>
          <table:table-cell office:value-type="string" calcext:value-type="string">
            <text:p>Liber similitudinum naturalium - 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05.2 Ko</text:p>
          </table:table-cell>
          <table:table-cell office:value-type="string" calcext:value-type="string">
            <text:p>./Named_entity_recognition/data/animaux_encyclopedies/Conrad de Halberstadt - Liber similitudinum naturalium - 4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Iohannes de Sancto Geminiano</text:p>
          </table:table-cell>
          <table:table-cell office:value-type="string" calcext:value-type="string">
            <text:p>Summa de exemplis ac similitudinibus reru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32.2 Ko</text:p>
          </table:table-cell>
          <table:table-cell office:value-type="string" calcext:value-type="string">
            <text:p>./Named_entity_recognition/data/animaux_encyclopedies/Iohannes de Sancto Geminiano - Summa de exemplis ac similitudinibus rerum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Engelbertus Admontensis</text:p>
          </table:table-cell>
          <table:table-cell office:value-type="string" calcext:value-type="string">
            <text:p>Tractatus de naturis animaliu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2.4 Ko</text:p>
          </table:table-cell>
          <table:table-cell office:value-type="string" calcext:value-type="string">
            <text:p>./Named_entity_recognition/data/animaux_encyclopedies/Engelbertus Admontensis - Tractatus de naturis animalium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Marcus de Urbe Veteri</text:p>
          </table:table-cell>
          <table:table-cell office:value-type="string" calcext:value-type="string">
            <text:p>Tractatus septiformis de moralitatibus reru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584.6 Ko</text:p>
          </table:table-cell>
          <table:table-cell office:value-type="string" calcext:value-type="string">
            <text:p>./Named_entity_recognition/data/animaux_encyclopedies/Marcus de Urbe Veteri - Tractatus septiformis de moralitatibus rerum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Thomas Cantimpratensis</text:p>
          </table:table-cell>
          <table:table-cell office:value-type="string" calcext:value-type="string">
            <text:p>Liber de natura rerum, version Thomas II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50.6 Ko</text:p>
          </table:table-cell>
          <table:table-cell office:value-type="string" calcext:value-type="string">
            <text:p>./Named_entity_recognition/data/animaux_encyclopedies/Thomas Cantimpratensis - Liber de natura rerum, version Thomas III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Vincentius Belvacensis</text:p>
          </table:table-cell>
          <table:table-cell office:value-type="string" calcext:value-type="string">
            <text:p>Speculum natura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417.4 Ko</text:p>
          </table:table-cell>
          <table:table-cell office:value-type="string" calcext:value-type="string">
            <text:p>./Named_entity_recognition/data/animaux_encyclopedies/Vincentius Belvacensis - Speculum naturale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Iohannes de Cuba</text:p>
          </table:table-cell>
          <table:table-cell office:value-type="string" calcext:value-type="string">
            <text:p>Hortus sanitatis, Liber de piscibu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30.1 Ko</text:p>
          </table:table-cell>
          <table:table-cell office:value-type="string" calcext:value-type="string">
            <text:p>./Named_entity_recognition/data/animaux_encyclopedies/Iohannes de Cuba - Hortus sanitatis, Liber de piscibus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Iohannes Egidius Zamorensis</text:p>
          </table:table-cell>
          <table:table-cell office:value-type="string" calcext:value-type="string">
            <text:p>Historia naturali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0.4 Ko</text:p>
          </table:table-cell>
          <table:table-cell office:value-type="string" calcext:value-type="string">
            <text:p>./Named_entity_recognition/data/animaux_encyclopedies/Iohannes Egidius Zamorensis - Historia naturalis.xml</text:p>
          </table:table-cell>
        </table:table-row>
        <table:table-row table:style-name="ro1">
          <table:table-cell office:value-type="string" calcext:value-type="string">
            <text:p>animaux_encyclopedies</text:p>
          </table:table-cell>
          <table:table-cell office:value-type="string" calcext:value-type="string">
            <text:p>Thomas Cantimpratensis</text:p>
          </table:table-cell>
          <table:table-cell office:value-type="string" calcext:value-type="string">
            <text:p>Liber de natura rerum, version Thomas I I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800.2 Ko</text:p>
          </table:table-cell>
          <table:table-cell office:value-type="string" calcext:value-type="string">
            <text:p>./Named_entity_recognition/data/animaux_encyclopedies/Thomas Cantimpratensis - Liber de natura rerum, version Thomas I II.xml</text:p>
          </table:table-cell>
        </table:table-row>
        <table:table-row table:style-name="ro1">
          <table:table-cell office:value-type="string" calcext:value-type="string">
            <text:p>.ide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kspac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.1 Ko</text:p>
          </table:table-cell>
          <table:table-cell office:value-type="string" calcext:value-type="string">
            <text:p>./Named_entity_recognition/data/animaux_encyclopedies/.idea/workspace.xml</text:p>
          </table:table-cell>
        </table:table-row>
        <table:table-row table:style-name="ro1">
          <table:table-cell office:value-type="string" calcext:value-type="string">
            <text:p>tlg0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45.tlg001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549.7 Ko</text:p>
          </table:table-cell>
          <table:table-cell office:value-type="string" calcext:value-type="string">
            <text:p>./Named_entity_recognition/data/tlg0545/tlg0545.tlg001.perseus-grc1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3.tlg001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50.1 Ko</text:p>
          </table:table-cell>
          <table:table-cell office:value-type="string" calcext:value-type="string">
            <text:p>./Named_entity_recognition/data/tlg0023/tlg001/tlg0023.tlg001.perseus-grc1.xml</text:p>
          </table:table-cell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4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26.7 Ko</text:p>
          </table:table-cell>
          <table:table-cell office:value-type="string" calcext:value-type="string">
            <text:p>./Named_entity_recognition/data/tlg0032/tlg014/tlg0032.tlg014.perseus-grc1.xml</text:p>
          </table:table-cell>
        </table:table-row>
        <table:table-row table:style-name="ro1">
          <table:table-cell office:value-type="string" calcext:value-type="string">
            <text:p>tlg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03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38.8 Ko</text:p>
          </table:table-cell>
          <table:table-cell office:value-type="string" calcext:value-type="string">
            <text:p>./Named_entity_recognition/data/tlg0032/tlg003/tlg0032.tlg003.perseus-grc1.xml</text:p>
          </table:table-cell>
        </table:table-row>
        <table:table-row table:style-name="ro1">
          <table:table-cell office:value-type="string" calcext:value-type="string">
            <text:p>tlg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3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95.5 Ko</text:p>
          </table:table-cell>
          <table:table-cell office:value-type="string" calcext:value-type="string">
            <text:p>./Named_entity_recognition/data/tlg0032/tlg013/tlg0032.tlg013.perseus-grc1.xml</text:p>
          </table:table-cell>
        </table:table-row>
        <table:table-row table:style-name="ro1">
          <table:table-cell office:value-type="string" calcext:value-type="string">
            <text:p>tlg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2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83.3 Ko</text:p>
          </table:table-cell>
          <table:table-cell office:value-type="string" calcext:value-type="string">
            <text:p>./Named_entity_recognition/data/tlg0032/tlg012/tlg0032.tlg012.perseus-grc1.xml</text:p>
          </table:table-cell>
        </table:table-row>
        <table:table-row table:style-name="ro1">
          <table:table-cell office:value-type="string" calcext:value-type="string">
            <text:p>tlg0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53.tlg001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910.5 Ko</text:p>
          </table:table-cell>
          <table:table-cell office:value-type="string" calcext:value-type="string">
            <text:p>./Named_entity_recognition/data/tlg0553/tlg0553.tlg001.1st1K-grc1.xml</text:p>
          </table:table-cell>
        </table:table-row>
        <table:table-row table:style-name="ro1">
          <table:table-cell office:value-type="string" calcext:value-type="string">
            <text:p>tlg0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27.tlg005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72.8 Ko</text:p>
          </table:table-cell>
          <table:table-cell office:value-type="string" calcext:value-type="string">
            <text:p>./Named_entity_recognition/data/tlg0627/tlg0627.tlg005.perseus-grc1.xml</text:p>
          </table:table-cell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57.tlg010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63.8 Ko</text:p>
          </table:table-cell>
          <table:table-cell office:value-type="string" calcext:value-type="string">
            <text:p>./Named_entity_recognition/data/tlg0057/tlg010/tlg0057.tlg010.perseus-grc1.xml</text:p>
          </table:table-cell>
        </table:table-row>
        <table:table-row table:style-name="ro1">
          <table:table-cell office:value-type="string" calcext:value-type="string">
            <text:p>tlg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9.opp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559.4 Ko</text:p>
          </table:table-cell>
          <table:table-cell office:value-type="string" calcext:value-type="string">
            <text:p>./Named_entity_recognition/data/tlg0018/tlg019/tlg0018.tlg019.opp-grc1.xml</text:p>
          </table:table-cell>
        </table:table-row>
        <table:table-row table:style-name="ro1">
          <table:table-cell office:value-type="string" calcext:value-type="string">
            <text:p>tlg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29.opp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258.9 Ko</text:p>
          </table:table-cell>
          <table:table-cell office:value-type="string" calcext:value-type="string">
            <text:p>./Named_entity_recognition/data/tlg0018/tlg029/tlg0018.tlg029.opp-grc1.xml</text:p>
          </table:table-cell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0.opp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201.1 Ko</text:p>
          </table:table-cell>
          <table:table-cell office:value-type="string" calcext:value-type="string">
            <text:p>./Named_entity_recognition/data/tlg0018/tlg010/tlg0018.tlg010.opp-grc1.xml</text:p>
          </table:table-cell>
        </table:table-row>
        <table:table-row table:style-name="ro1">
          <table:table-cell office:value-type="string" calcext:value-type="string">
            <text:p>tlg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09.opp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206.9 Ko</text:p>
          </table:table-cell>
          <table:table-cell office:value-type="string" calcext:value-type="string">
            <text:p>./Named_entity_recognition/data/tlg0018/tlg009/tlg0018.tlg009.opp-grc1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2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547.1 Ko</text:p>
          </table:table-cell>
          <table:table-cell office:value-type="string" calcext:value-type="string">
            <text:p>./Named_entity_recognition/data/tlg0060/tlg001/tlg0060.tlg001.perseus-grc2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289.7 Ko</text:p>
          </table:table-cell>
          <table:table-cell office:value-type="string" calcext:value-type="string">
            <text:p>./Named_entity_recognition/data/tlg0060/tlg001/tlg0060.tlg001.perseus-grc1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3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286.3 Ko</text:p>
          </table:table-cell>
          <table:table-cell office:value-type="string" calcext:value-type="string">
            <text:p>./Named_entity_recognition/data/tlg0060/tlg001/tlg0060.tlg001.perseus-grc3.xml</text:p>
          </table:table-cell>
        </table:table-row>
        <table:table-row table:style-name="ro1">
          <table:table-cell office:value-type="string" calcext:value-type="string">
            <text:p>tlg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6.tlg002.Fir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23.4 Ko</text:p>
          </table:table-cell>
          <table:table-cell office:value-type="string" calcext:value-type="string">
            <text:p>./Named_entity_recognition/data/tlg0096/tlg0096.tlg002.First1K-grc1.xml</text:p>
          </table:table-cell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2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8.6 Ko</text:p>
          </table:table-cell>
          <table:table-cell office:value-type="string" calcext:value-type="string">
            <text:p>./Named_entity_recognition/data/tlg0062/tlg027/tlg0062.tlg027.perseus-grc2.xml</text:p>
          </table:table-cell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8.3 Ko</text:p>
          </table:table-cell>
          <table:table-cell office:value-type="string" calcext:value-type="string">
            <text:p>./Named_entity_recognition/data/tlg0062/tlg027/tlg0062.tlg027.perseus-grc1.xml</text:p>
          </table:table-cell>
        </table:table-row>
        <table:table-row table:style-name="ro1">
          <table:table-cell office:value-type="string" calcext:value-type="string">
            <text:p>tlg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54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5.3 Ko</text:p>
          </table:table-cell>
          <table:table-cell office:value-type="string" calcext:value-type="string">
            <text:p>./Named_entity_recognition/data/tlg0062/tlg054/tlg0062.tlg054.perseus-grc1.xml</text:p>
          </table:table-cell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4.tlg001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59.1 Ko</text:p>
          </table:table-cell>
          <table:table-cell office:value-type="string" calcext:value-type="string">
            <text:p>./Named_entity_recognition/data/tlg0024/tlg001/tlg0024.tlg001.perseus-grc1.xml</text:p>
          </table:table-cell>
        </table:table-row>
        <table:table-row table:style-name="ro1">
          <table:table-cell office:value-type="string" calcext:value-type="string">
            <text:p>tlg0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8.tlg001.perseus-grc4_annotated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7374.3 Ko</text:p>
          </table:table-cell>
          <table:table-cell office:value-type="string" calcext:value-type="string">
            <text:p>./Named_entity_recognition/data/tlg0008/tlg0008.tlg001.perseus-grc4_annotated.xml</text:p>
          </table:table-cell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2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624.2 Ko</text:p>
          </table:table-cell>
          <table:table-cell office:value-type="string" calcext:value-type="string">
            <text:p>./Named_entity_recognition/data/phi0845/phi0845.phi002.perseus-lat2.xml</text:p>
          </table:table-cell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1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77.4 Ko</text:p>
          </table:table-cell>
          <table:table-cell office:value-type="string" calcext:value-type="string">
            <text:p>./Named_entity_recognition/data/phi0845/phi0845.phi002.perseus-lat1.xml</text:p>
          </table:table-cell>
        </table:table-row>
        <table:table-row table:style-name="ro1">
          <table:table-cell office:value-type="string" calcext:value-type="string">
            <text:p>tlg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2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0.0 Ko</text:p>
          </table:table-cell>
          <table:table-cell office:value-type="string" calcext:value-type="string">
            <text:p>./Named_entity_recognition/data/tlg0007/tlg132/tlg0007.tlg132.perseus-grc1.xml</text:p>
          </table:table-cell>
        </table:table-row>
        <table:table-row table:style-name="ro1">
          <table:table-cell office:value-type="string" calcext:value-type="string">
            <text:p>tlg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0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1.3 Ko</text:p>
          </table:table-cell>
          <table:table-cell office:value-type="string" calcext:value-type="string">
            <text:p>./Named_entity_recognition/data/tlg0007/tlg130/tlg0007.tlg130.perseus-grc1.xml</text:p>
          </table:table-cell>
        </table:table-row>
        <table:table-row table:style-name="ro1">
          <table:table-cell office:value-type="string" calcext:value-type="string">
            <text:p>tlg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5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65.5 Ko</text:p>
          </table:table-cell>
          <table:table-cell office:value-type="string" calcext:value-type="string">
            <text:p>./Named_entity_recognition/data/tlg0007/tlg125/tlg0007.tlg125.perseus-grc1.xml</text:p>
          </table:table-cell>
        </table:table-row>
        <table:table-row table:style-name="ro1">
          <table:table-cell office:value-type="string" calcext:value-type="string">
            <text:p>tlg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098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0.2 Ko</text:p>
          </table:table-cell>
          <table:table-cell office:value-type="string" calcext:value-type="string">
            <text:p>./Named_entity_recognition/data/tlg0007/tlg098/tlg0007.tlg098.perseus-grc1.xml</text:p>
          </table:table-cell>
        </table:table-row>
        <table:table-row table:style-name="ro1">
          <table:table-cell office:value-type="string" calcext:value-type="string">
            <text:p>tlg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9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75.7 Ko</text:p>
          </table:table-cell>
          <table:table-cell office:value-type="string" calcext:value-type="string">
            <text:p>./Named_entity_recognition/data/tlg0007/tlg129/tlg0007.tlg129.perseus-grc1.xml</text:p>
          </table:table-cell>
        </table:table-row>
        <table:table-row table:style-name="ro1">
          <table:table-cell office:value-type="string" calcext:value-type="string">
            <text:p>tlg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8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5.3 Ko</text:p>
          </table:table-cell>
          <table:table-cell office:value-type="string" calcext:value-type="string">
            <text:p>./Named_entity_recognition/data/tlg0086/tlg018/tlg0086.tlg018.1st1K-grc1.xml</text:p>
          </table:table-cell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4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219.4 Ko</text:p>
          </table:table-cell>
          <table:table-cell office:value-type="string" calcext:value-type="string">
            <text:p>./Named_entity_recognition/data/tlg0086/tlg014/tlg0086.tlg014.1st1K-grc1.xml</text:p>
          </table:table-cell>
        </table:table-row>
        <table:table-row table:style-name="ro1">
          <table:table-cell office:value-type="string" calcext:value-type="string">
            <text:p>tlg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29.perseus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95.3 Ko</text:p>
          </table:table-cell>
          <table:table-cell office:value-type="string" calcext:value-type="string">
            <text:p>./Named_entity_recognition/data/tlg0086/tlg029/tlg0086.tlg029.perseus-grc1.xml</text:p>
          </table:table-cell>
        </table:table-row>
        <table:table-row table:style-name="ro1">
          <table:table-cell office:value-type="string" calcext:value-type="string">
            <text:p>tlg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7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82.4 Ko</text:p>
          </table:table-cell>
          <table:table-cell office:value-type="string" calcext:value-type="string">
            <text:p>./Named_entity_recognition/data/tlg0086/tlg037/tlg0086.tlg037.1st1K-grc1.xml</text:p>
          </table:table-cell>
        </table:table-row>
        <table:table-row table:style-name="ro1">
          <table:table-cell office:value-type="string" calcext:value-type="string">
            <text:p>tlg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0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560.2 Ko</text:p>
          </table:table-cell>
          <table:table-cell office:value-type="string" calcext:value-type="string">
            <text:p>./Named_entity_recognition/data/tlg0086/tlg030/tlg0086.tlg030.1st1K-grc1.xml</text:p>
          </table:table-cell>
        </table:table-row>
        <table:table-row table:style-name="ro1">
          <table:table-cell office:value-type="string" calcext:value-type="string">
            <text:p>tlg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41.1st1K-grc1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17.8 Ko</text:p>
          </table:table-cell>
          <table:table-cell office:value-type="string" calcext:value-type="string">
            <text:p>./Named_entity_recognition/data/tlg0086/tlg041/tlg0086.tlg041.1st1K-grc1.xml</text:p>
          </table:table-cell>
        </table:table-row>
      </table:table>
      <table:table table:name="Doublons" table:style-name="ta1">
        <table:table-column table:style-name="co8" table:number-columns-repeated="8" table:default-cell-style-name="Default"/>
        <table:table-row table:style-name="ro1"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Auteur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Langu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Taille</text:p>
          </table:table-cell>
          <table:table-cell table:style-name="ce2" office:value-type="string" calcext:value-type="string">
            <text:p>Chemin complet</text:p>
          </table:table-cell>
          <table:table-cell table:style-name="ce2"/>
        </table:table-row>
        <table:table-row table:style-name="ro1">
          <table:table-cell office:value-type="string" calcext:value-type="string">
            <text:p>tlg0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14.tlg001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449.3 Ko</text:p>
          </table:table-cell>
          <table:table-cell office:value-type="string" calcext:value-type="string">
            <text:p>./Named_entity_recognition/_old_file/data/extraction_result/tlg0614/tlg0614.tlg001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phi0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5.phi001.perseus-lat1-p5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652.0 Ko</text:p>
          </table:table-cell>
          <table:table-cell office:value-type="string" calcext:value-type="string">
            <text:p>./Named_entity_recognition/_old_file/data/extraction_result/phi0975/phi0975.phi001.perseus-lat1-p5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6.tlg001.perseus-grc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051.0 Ko</text:p>
          </table:table-cell>
          <table:table-cell office:value-type="string" calcext:value-type="string">
            <text:p>./Named_entity_recognition/_old_file/data/extraction_result/tlg0016/tlg001/tlg0016.tlg001.perseus-grc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0.tlg002.perseus-grc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97.2 Ko</text:p>
          </table:table-cell>
          <table:table-cell office:value-type="string" calcext:value-type="string">
            <text:p>./Named_entity_recognition/_old_file/data/extraction_result/tlg0020/tlg002/tlg0020.tlg002.perseus-grc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9.tlg001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5597.5 Ko</text:p>
          </table:table-cell>
          <table:table-cell office:value-type="string" calcext:value-type="string">
            <text:p>./Named_entity_recognition/_old_file/data/extraction_result/tlg0099/tlg0099.tlg001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phi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8.phi001.perseus-lat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2069.0 Ko</text:p>
          </table:table-cell>
          <table:table-cell office:value-type="string" calcext:value-type="string">
            <text:p>./Named_entity_recognition/_old_file/data/extraction_result/phi0978/phi0978.phi001.perseus-lat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45.tlg001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086.2 Ko</text:p>
          </table:table-cell>
          <table:table-cell office:value-type="string" calcext:value-type="string">
            <text:p>./Named_entity_recognition/_old_file/data/extraction_result/tlg0545/tlg0545.tlg001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3.tlg001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180.9 Ko</text:p>
          </table:table-cell>
          <table:table-cell office:value-type="string" calcext:value-type="string">
            <text:p>./Named_entity_recognition/_old_file/data/extraction_result/tlg0023/tlg001/tlg0023.tlg001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4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31.7 Ko</text:p>
          </table:table-cell>
          <table:table-cell office:value-type="string" calcext:value-type="string">
            <text:p>./Named_entity_recognition/_old_file/data/extraction_result/tlg0032/tlg014/tlg0032.tlg014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03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698.6 Ko</text:p>
          </table:table-cell>
          <table:table-cell office:value-type="string" calcext:value-type="string">
            <text:p>./Named_entity_recognition/_old_file/data/extraction_result/tlg0032/tlg003/tlg0032.tlg003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3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35.3 Ko</text:p>
          </table:table-cell>
          <table:table-cell office:value-type="string" calcext:value-type="string">
            <text:p>./Named_entity_recognition/_old_file/data/extraction_result/tlg0032/tlg013/tlg0032.tlg013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2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01.3 Ko</text:p>
          </table:table-cell>
          <table:table-cell office:value-type="string" calcext:value-type="string">
            <text:p>./Named_entity_recognition/_old_file/data/extraction_result/tlg0032/tlg012/tlg0032.tlg012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53.tlg001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272.5 Ko</text:p>
          </table:table-cell>
          <table:table-cell office:value-type="string" calcext:value-type="string">
            <text:p>./Named_entity_recognition/_old_file/data/extraction_result/tlg0553/tlg0553.tlg001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27.tlg005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40.7 Ko</text:p>
          </table:table-cell>
          <table:table-cell office:value-type="string" calcext:value-type="string">
            <text:p>./Named_entity_recognition/_old_file/data/extraction_result/tlg0627/tlg0627.tlg005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57.tlg010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203.0 Ko</text:p>
          </table:table-cell>
          <table:table-cell office:value-type="string" calcext:value-type="string">
            <text:p>./Named_entity_recognition/_old_file/data/extraction_result/tlg0057/tlg010/tlg0057.tlg010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9.opp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1680.0 Ko</text:p>
          </table:table-cell>
          <table:table-cell office:value-type="string" calcext:value-type="string">
            <text:p>./Named_entity_recognition/_old_file/data/extraction_result/tlg0018/tlg019/tlg0018.tlg019.opp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29.opp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817.3 Ko</text:p>
          </table:table-cell>
          <table:table-cell office:value-type="string" calcext:value-type="string">
            <text:p>./Named_entity_recognition/_old_file/data/extraction_result/tlg0018/tlg029/tlg0018.tlg029.opp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0.opp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592.1 Ko</text:p>
          </table:table-cell>
          <table:table-cell office:value-type="string" calcext:value-type="string">
            <text:p>./Named_entity_recognition/_old_file/data/extraction_result/tlg0018/tlg010/tlg0018.tlg010.opp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09.opp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661.1 Ko</text:p>
          </table:table-cell>
          <table:table-cell office:value-type="string" calcext:value-type="string">
            <text:p>./Named_entity_recognition/_old_file/data/extraction_result/tlg0018/tlg009/tlg0018.tlg009.opp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739.7 Ko</text:p>
          </table:table-cell>
          <table:table-cell office:value-type="string" calcext:value-type="string">
            <text:p>./Named_entity_recognition/_old_file/data/extraction_result/tlg0060/tlg001/tlg0060.tlg001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459.1 Ko</text:p>
          </table:table-cell>
          <table:table-cell office:value-type="string" calcext:value-type="string">
            <text:p>./Named_entity_recognition/_old_file/data/extraction_result/tlg0060/tlg001/tlg0060.tlg001.perseus-grc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3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9763.9 Ko</text:p>
          </table:table-cell>
          <table:table-cell office:value-type="string" calcext:value-type="string">
            <text:p>./Named_entity_recognition/_old_file/data/extraction_result/tlg0060/tlg001/tlg0060.tlg001.perseus-grc3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6.tlg002.Fir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10.1 Ko</text:p>
          </table:table-cell>
          <table:table-cell office:value-type="string" calcext:value-type="string">
            <text:p>./Named_entity_recognition/_old_file/data/extraction_result/tlg0096/tlg0096.tlg002.Fir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96.2 Ko</text:p>
          </table:table-cell>
          <table:table-cell office:value-type="string" calcext:value-type="string">
            <text:p>./Named_entity_recognition/_old_file/data/extraction_result/tlg0062/tlg027/tlg0062.tlg027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6.6 Ko</text:p>
          </table:table-cell>
          <table:table-cell office:value-type="string" calcext:value-type="string">
            <text:p>./Named_entity_recognition/_old_file/data/extraction_result/tlg0062/tlg027/tlg0062.tlg027.perseus-grc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54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7.3 Ko</text:p>
          </table:table-cell>
          <table:table-cell office:value-type="string" calcext:value-type="string">
            <text:p>./Named_entity_recognition/_old_file/data/extraction_result/tlg0062/tlg054/tlg0062.tlg054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erseus_text_2008.01.051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.4 Ko</text:p>
          </table:table-cell>
          <table:table-cell office:value-type="string" calcext:value-type="string">
            <text:p>./Named_entity_recognition/_old_file/data/extraction_result/tlg0062/tlg054/Perseus_text_2008.01.0512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4.tlg001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776.0 Ko</text:p>
          </table:table-cell>
          <table:table-cell office:value-type="string" calcext:value-type="string">
            <text:p>./Named_entity_recognition/_old_file/data/extraction_result/tlg0024/tlg001/tlg0024.tlg001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2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358.0 Ko</text:p>
          </table:table-cell>
          <table:table-cell office:value-type="string" calcext:value-type="string">
            <text:p>./Named_entity_recognition/_old_file/data/extraction_result/phi0845/phi0845.phi002.perseus-lat2_translated_extracted.xml</text:p>
          </table:table-cell>
          <table:table-cell/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141.4 Ko</text:p>
          </table:table-cell>
          <table:table-cell office:value-type="string" calcext:value-type="string">
            <text:p>./Named_entity_recognition/_old_file/data/extraction_result/phi0845/phi0845.phi002.perseus-lat1_translated_extracted.xml</text:p>
          </table:table-cell>
          <table:table-cell/>
        </table:table-row>
        <table:table-row table:style-name="ro1">
          <table:table-cell office:value-type="string" calcext:value-type="string">
            <text:p>tlg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2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7.8 Ko</text:p>
          </table:table-cell>
          <table:table-cell office:value-type="string" calcext:value-type="string">
            <text:p>./Named_entity_recognition/_old_file/data/extraction_result/tlg0007/tlg132/tlg0007.tlg132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0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38.5 Ko</text:p>
          </table:table-cell>
          <table:table-cell office:value-type="string" calcext:value-type="string">
            <text:p>./Named_entity_recognition/_old_file/data/extraction_result/tlg0007/tlg130/tlg0007.tlg130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5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03.4 Ko</text:p>
          </table:table-cell>
          <table:table-cell office:value-type="string" calcext:value-type="string">
            <text:p>./Named_entity_recognition/_old_file/data/extraction_result/tlg0007/tlg125/tlg0007.tlg125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098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37.3 Ko</text:p>
          </table:table-cell>
          <table:table-cell office:value-type="string" calcext:value-type="string">
            <text:p>./Named_entity_recognition/_old_file/data/extraction_result/tlg0007/tlg098/tlg0007.tlg098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9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07.1 Ko</text:p>
          </table:table-cell>
          <table:table-cell office:value-type="string" calcext:value-type="string">
            <text:p>./Named_entity_recognition/_old_file/data/extraction_result/tlg0007/tlg129/tlg0007.tlg129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8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57.3 Ko</text:p>
          </table:table-cell>
          <table:table-cell office:value-type="string" calcext:value-type="string">
            <text:p>./Named_entity_recognition/_old_file/data/extraction_result/tlg0086/tlg018/tlg0086.tlg018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4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3549.0 Ko</text:p>
          </table:table-cell>
          <table:table-cell office:value-type="string" calcext:value-type="string">
            <text:p>./Named_entity_recognition/_old_file/data/extraction_result/tlg0086/tlg014/tlg0086.tlg014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7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08.0 Ko</text:p>
          </table:table-cell>
          <table:table-cell office:value-type="string" calcext:value-type="string">
            <text:p>./Named_entity_recognition/_old_file/data/extraction_result/tlg0086/tlg037/tlg0086.tlg037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0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358.9 Ko</text:p>
          </table:table-cell>
          <table:table-cell office:value-type="string" calcext:value-type="string">
            <text:p>./Named_entity_recognition/_old_file/data/extraction_result/tlg0086/tlg030/tlg0086.tlg030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41.1st1K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53.2 Ko</text:p>
          </table:table-cell>
          <table:table-cell office:value-type="string" calcext:value-type="string">
            <text:p>./Named_entity_recognition/_old_file/data/extraction_result/tlg0086/tlg041/tlg0086.tlg041.1st1K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74.tlg003.perseus-grc1_translated_extrac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50.6 Ko</text:p>
          </table:table-cell>
          <table:table-cell office:value-type="string" calcext:value-type="string">
            <text:p>./Named_entity_recognition/_old_file/data/extraction_result/tlg0074/tlg003/tlg0074.tlg003.perseus-grc1_translated_extracted.xml</text:p>
          </table:table-cell>
          <table:table-cell/>
        </table:table-row>
        <table:table-row table:style-name="ro1">
          <table:table-cell office:value-type="string" calcext:value-type="string">
            <text:p>tlg0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14.tlg001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326.6 Ko</text:p>
          </table:table-cell>
          <table:table-cell office:value-type="string" calcext:value-type="string">
            <text:p>./Named_entity_recognition/_old_file/data/translated_files/tlg0614/tlg0614.tlg001.1st1K-grc1_translated.xml</text:p>
          </table:table-cell>
          <table:table-cell/>
        </table:table-row>
        <table:table-row table:style-name="ro1">
          <table:table-cell office:value-type="string" calcext:value-type="string">
            <text:p>phi0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5.phi001.perseus-lat1-p5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52.7 Ko</text:p>
          </table:table-cell>
          <table:table-cell office:value-type="string" calcext:value-type="string">
            <text:p>./Named_entity_recognition/_old_file/data/translated_files/phi0975/phi0975.phi001.perseus-lat1-p5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6.tlg001.perseus-grc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392.5 Ko</text:p>
          </table:table-cell>
          <table:table-cell office:value-type="string" calcext:value-type="string">
            <text:p>./Named_entity_recognition/_old_file/data/translated_files/tlg0016/tlg001/tlg0016.tlg001.perseus-grc2_translated.xml</text:p>
          </table:table-cell>
          <table:table-cell/>
        </table:table-row>
        <table:table-row table:style-name="ro1">
          <table:table-cell office:value-type="string" calcext:value-type="string">
            <text:p>tlg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0.tlg002.perseus-grc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26.0 Ko</text:p>
          </table:table-cell>
          <table:table-cell office:value-type="string" calcext:value-type="string">
            <text:p>./Named_entity_recognition/_old_file/data/translated_files/tlg0020/tlg002/tlg0020.tlg002.perseus-grc2_translated.xml</text:p>
          </table:table-cell>
          <table:table-cell/>
        </table:table-row>
        <table:table-row table:style-name="ro1">
          <table:table-cell office:value-type="string" calcext:value-type="string">
            <text:p>tlg0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9.tlg001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7500.5 Ko</text:p>
          </table:table-cell>
          <table:table-cell office:value-type="string" calcext:value-type="string">
            <text:p>./Named_entity_recognition/_old_file/data/translated_files/tlg0099/tlg0099.tlg001.perseus-grc1_translated.xml</text:p>
          </table:table-cell>
          <table:table-cell/>
        </table:table-row>
        <table:table-row table:style-name="ro1">
          <table:table-cell office:value-type="string" calcext:value-type="string">
            <text:p>phi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978.phi001.perseus-lat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3017.9 Ko</text:p>
          </table:table-cell>
          <table:table-cell office:value-type="string" calcext:value-type="string">
            <text:p>./Named_entity_recognition/_old_file/data/translated_files/phi0978/phi0978.phi001.perseus-lat2_translated.xml</text:p>
          </table:table-cell>
          <table:table-cell/>
        </table:table-row>
        <table:table-row table:style-name="ro1">
          <table:table-cell office:value-type="string" calcext:value-type="string">
            <text:p>phi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erseus_text_1999.02.0138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546.8 Ko</text:p>
          </table:table-cell>
          <table:table-cell office:value-type="string" calcext:value-type="string">
            <text:p>./Named_entity_recognition/_old_file/data/translated_files/phi0978/Perseus_text_1999.02.0138_translated.xml</text:p>
          </table:table-cell>
          <table:table-cell/>
        </table:table-row>
        <table:table-row table:style-name="ro1">
          <table:table-cell office:value-type="string" calcext:value-type="string">
            <text:p>tlg0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45.tlg001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640.8 Ko</text:p>
          </table:table-cell>
          <table:table-cell office:value-type="string" calcext:value-type="string">
            <text:p>./Named_entity_recognition/_old_file/data/translated_files/tlg0545/tlg0545.tlg001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3.tlg001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943.3 Ko</text:p>
          </table:table-cell>
          <table:table-cell office:value-type="string" calcext:value-type="string">
            <text:p>./Named_entity_recognition/_old_file/data/translated_files/tlg0023/tlg001/tlg0023.tlg001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4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62.3 Ko</text:p>
          </table:table-cell>
          <table:table-cell office:value-type="string" calcext:value-type="string">
            <text:p>./Named_entity_recognition/_old_file/data/translated_files/tlg0032/tlg014/tlg0032.tlg014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03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96.9 Ko</text:p>
          </table:table-cell>
          <table:table-cell office:value-type="string" calcext:value-type="string">
            <text:p>./Named_entity_recognition/_old_file/data/translated_files/tlg0032/tlg003/tlg0032.tlg003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3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97.2 Ko</text:p>
          </table:table-cell>
          <table:table-cell office:value-type="string" calcext:value-type="string">
            <text:p>./Named_entity_recognition/_old_file/data/translated_files/tlg0032/tlg013/tlg0032.tlg013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32.tlg012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70.9 Ko</text:p>
          </table:table-cell>
          <table:table-cell office:value-type="string" calcext:value-type="string">
            <text:p>./Named_entity_recognition/_old_file/data/translated_files/tlg0032/tlg012/tlg0032.tlg012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553.tlg001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755.5 Ko</text:p>
          </table:table-cell>
          <table:table-cell office:value-type="string" calcext:value-type="string">
            <text:p>./Named_entity_recognition/_old_file/data/translated_files/tlg0553/tlg0553.tlg001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627.tlg005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51.7 Ko</text:p>
          </table:table-cell>
          <table:table-cell office:value-type="string" calcext:value-type="string">
            <text:p>./Named_entity_recognition/_old_file/data/translated_files/tlg0627/tlg0627.tlg005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57.tlg010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820.9 Ko</text:p>
          </table:table-cell>
          <table:table-cell office:value-type="string" calcext:value-type="string">
            <text:p>./Named_entity_recognition/_old_file/data/translated_files/tlg0057/tlg010/tlg0057.tlg010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9.opp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1071.7 Ko</text:p>
          </table:table-cell>
          <table:table-cell office:value-type="string" calcext:value-type="string">
            <text:p>./Named_entity_recognition/_old_file/data/translated_files/tlg0018/tlg019/tlg0018.tlg019.opp-grc1_translated.xml</text:p>
          </table:table-cell>
          <table:table-cell/>
        </table:table-row>
        <table:table-row table:style-name="ro1">
          <table:table-cell office:value-type="string" calcext:value-type="string">
            <text:p>tlg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29.opp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505.1 Ko</text:p>
          </table:table-cell>
          <table:table-cell office:value-type="string" calcext:value-type="string">
            <text:p>./Named_entity_recognition/_old_file/data/translated_files/tlg0018/tlg029/tlg0018.tlg029.opp-grc1_translated.xml</text:p>
          </table:table-cell>
          <table:table-cell/>
        </table:table-row>
        <table:table-row table:style-name="ro1">
          <table:table-cell office:value-type="string" calcext:value-type="string">
            <text:p>tlg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10.opp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385.1 Ko</text:p>
          </table:table-cell>
          <table:table-cell office:value-type="string" calcext:value-type="string">
            <text:p>./Named_entity_recognition/_old_file/data/translated_files/tlg0018/tlg010/tlg0018.tlg010.opp-grc1_translated.xml</text:p>
          </table:table-cell>
          <table:table-cell/>
        </table:table-row>
        <table:table-row table:style-name="ro1">
          <table:table-cell office:value-type="string" calcext:value-type="string">
            <text:p>tlg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18.tlg009.opp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397.0 Ko</text:p>
          </table:table-cell>
          <table:table-cell office:value-type="string" calcext:value-type="string">
            <text:p>./Named_entity_recognition/_old_file/data/translated_files/tlg0018/tlg009/tlg0018.tlg009.opp-grc1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518.9 Ko</text:p>
          </table:table-cell>
          <table:table-cell office:value-type="string" calcext:value-type="string">
            <text:p>./Named_entity_recognition/_old_file/data/translated_files/tlg0060/tlg001/tlg0060.tlg001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3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497.6 Ko</text:p>
          </table:table-cell>
          <table:table-cell office:value-type="string" calcext:value-type="string">
            <text:p>./Named_entity_recognition/_old_file/data/translated_files/tlg0060/tlg001/tlg0060.tlg001.perseus-grc3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0.tlg001.perseus-grc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400.0 Ko</text:p>
          </table:table-cell>
          <table:table-cell office:value-type="string" calcext:value-type="string">
            <text:p>./Named_entity_recognition/_old_file/data/translated_files/tlg0060/tlg001/tlg0060.tlg001.perseus-grc2_translated.xml</text:p>
          </table:table-cell>
          <table:table-cell/>
        </table:table-row>
        <table:table-row table:style-name="ro1">
          <table:table-cell office:value-type="string" calcext:value-type="string">
            <text:p>tlg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96.tlg002.Fir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70.2 Ko</text:p>
          </table:table-cell>
          <table:table-cell office:value-type="string" calcext:value-type="string">
            <text:p>./Named_entity_recognition/_old_file/data/translated_files/tlg0096/tlg0096.tlg002.First1K-grc1_translated.xml</text:p>
          </table:table-cell>
          <table:table-cell/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46.9 Ko</text:p>
          </table:table-cell>
          <table:table-cell office:value-type="string" calcext:value-type="string">
            <text:p>./Named_entity_recognition/_old_file/data/translated_files/tlg0062/tlg027/tlg0062.tlg027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27.perseus-grc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7.3 Ko</text:p>
          </table:table-cell>
          <table:table-cell office:value-type="string" calcext:value-type="string">
            <text:p>./Named_entity_recognition/_old_file/data/translated_files/tlg0062/tlg027/tlg0062.tlg027.perseus-grc2_translated.xml</text:p>
          </table:table-cell>
          <table:table-cell/>
        </table:table-row>
        <table:table-row table:style-name="ro1">
          <table:table-cell office:value-type="string" calcext:value-type="string">
            <text:p>tlg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erseus_text_2008.01.051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.1 Ko</text:p>
          </table:table-cell>
          <table:table-cell office:value-type="string" calcext:value-type="string">
            <text:p>./Named_entity_recognition/_old_file/data/translated_files/tlg0062/tlg054/Perseus_text_2008.01.0512_translated.xml</text:p>
          </table:table-cell>
          <table:table-cell/>
        </table:table-row>
        <table:table-row table:style-name="ro1">
          <table:table-cell office:value-type="string" calcext:value-type="string">
            <text:p>tlg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62.tlg054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25.3 Ko</text:p>
          </table:table-cell>
          <table:table-cell office:value-type="string" calcext:value-type="string">
            <text:p>./Named_entity_recognition/_old_file/data/translated_files/tlg0062/tlg054/tlg0062.tlg054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24.tlg001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586.5 Ko</text:p>
          </table:table-cell>
          <table:table-cell office:value-type="string" calcext:value-type="string">
            <text:p>./Named_entity_recognition/_old_file/data/translated_files/tlg0024/tlg001/tlg0024.tlg001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8.tlg001.perseus-grc3_not_annotated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1002.4 Ko</text:p>
          </table:table-cell>
          <table:table-cell office:value-type="string" calcext:value-type="string">
            <text:p>./Named_entity_recognition/_old_file/data/translated_files/tlg0008/tlg0008.tlg001.perseus-grc3_not_annotated_translated.xml</text:p>
          </table:table-cell>
          <table:table-cell/>
        </table:table-row>
        <table:table-row table:style-name="ro1">
          <table:table-cell office:value-type="string" calcext:value-type="string">
            <text:p>tlg0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8.tlg001.perseus-grc4_annotated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1273.8 Ko</text:p>
          </table:table-cell>
          <table:table-cell office:value-type="string" calcext:value-type="string">
            <text:p>./Named_entity_recognition/_old_file/data/translated_files/tlg0008/tlg0008.tlg001.perseus-grc4_annotated_translated.xml</text:p>
          </table:table-cell>
          <table:table-cell/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324.9 Ko</text:p>
          </table:table-cell>
          <table:table-cell office:value-type="string" calcext:value-type="string">
            <text:p>./Named_entity_recognition/_old_file/data/translated_files/phi0845/phi0845.phi002.perseus-lat1_translated.xml</text:p>
          </table:table-cell>
          <table:table-cell/>
        </table:table-row>
        <table:table-row table:style-name="ro1">
          <table:table-cell office:value-type="string" calcext:value-type="string">
            <text:p>phi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hi0845.phi002.perseus-lat2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383.2 Ko</text:p>
          </table:table-cell>
          <table:table-cell office:value-type="string" calcext:value-type="string">
            <text:p>./Named_entity_recognition/_old_file/data/translated_files/phi0845/phi0845.phi002.perseus-lat2_translated.xml</text:p>
          </table:table-cell>
          <table:table-cell/>
        </table:table-row>
        <table:table-row table:style-name="ro1">
          <table:table-cell office:value-type="string" calcext:value-type="string">
            <text:p>tlg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2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9.2 Ko</text:p>
          </table:table-cell>
          <table:table-cell office:value-type="string" calcext:value-type="string">
            <text:p>./Named_entity_recognition/_old_file/data/translated_files/tlg0007/tlg132/tlg0007.tlg132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30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0.0 Ko</text:p>
          </table:table-cell>
          <table:table-cell office:value-type="string" calcext:value-type="string">
            <text:p>./Named_entity_recognition/_old_file/data/translated_files/tlg0007/tlg130/tlg0007.tlg130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5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38.7 Ko</text:p>
          </table:table-cell>
          <table:table-cell office:value-type="string" calcext:value-type="string">
            <text:p>./Named_entity_recognition/_old_file/data/translated_files/tlg0007/tlg125/tlg0007.tlg125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098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1.8 Ko</text:p>
          </table:table-cell>
          <table:table-cell office:value-type="string" calcext:value-type="string">
            <text:p>./Named_entity_recognition/_old_file/data/translated_files/tlg0007/tlg098/tlg0007.tlg098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07.tlg129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348.2 Ko</text:p>
          </table:table-cell>
          <table:table-cell office:value-type="string" calcext:value-type="string">
            <text:p>./Named_entity_recognition/_old_file/data/translated_files/tlg0007/tlg129/tlg0007.tlg129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__cts__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2 Ko</text:p>
          </table:table-cell>
          <table:table-cell office:value-type="string" calcext:value-type="string">
            <text:p>./Named_entity_recognition/_old_file/data/translated_files/tlg0086/__cts___translated.xml</text:p>
          </table:table-cell>
          <table:table-cell/>
        </table:table-row>
        <table:table-row table:style-name="ro1">
          <table:table-cell office:value-type="string" calcext:value-type="string">
            <text:p>tlg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8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50.8 Ko</text:p>
          </table:table-cell>
          <table:table-cell office:value-type="string" calcext:value-type="string">
            <text:p>./Named_entity_recognition/_old_file/data/translated_files/tlg0086/tlg018/tlg0086.tlg018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14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561.5 Ko</text:p>
          </table:table-cell>
          <table:table-cell office:value-type="string" calcext:value-type="string">
            <text:p>./Named_entity_recognition/_old_file/data/translated_files/tlg0086/tlg014/tlg0086.tlg014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29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69.9 Ko</text:p>
          </table:table-cell>
          <table:table-cell office:value-type="string" calcext:value-type="string">
            <text:p>./Named_entity_recognition/_old_file/data/translated_files/tlg0086/tlg029/tlg0086.tlg029.perseus-grc1_translated.xml</text:p>
          </table:table-cell>
          <table:table-cell/>
        </table:table-row>
        <table:table-row table:style-name="ro1">
          <table:table-cell office:value-type="string" calcext:value-type="string">
            <text:p>tlg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7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70.6 Ko</text:p>
          </table:table-cell>
          <table:table-cell office:value-type="string" calcext:value-type="string">
            <text:p>./Named_entity_recognition/_old_file/data/translated_files/tlg0086/tlg037/tlg0086.tlg037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30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1057.5 Ko</text:p>
          </table:table-cell>
          <table:table-cell office:value-type="string" calcext:value-type="string">
            <text:p>./Named_entity_recognition/_old_file/data/translated_files/tlg0086/tlg030/tlg0086.tlg030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86.tlg041.1st1K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1st1K</text:p>
          </table:table-cell>
          <table:table-cell office:value-type="string" calcext:value-type="string">
            <text:p>214.2 Ko</text:p>
          </table:table-cell>
          <table:table-cell office:value-type="string" calcext:value-type="string">
            <text:p>./Named_entity_recognition/_old_file/data/translated_files/tlg0086/tlg041/tlg0086.tlg041.1st1K-grc1_translated.xml</text:p>
          </table:table-cell>
          <table:table-cell/>
        </table:table-row>
        <table:table-row table:style-name="ro1">
          <table:table-cell office:value-type="string" calcext:value-type="string">
            <text:p>tlg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g0074.tlg003.perseus-grc1_translate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1031.5 Ko</text:p>
          </table:table-cell>
          <table:table-cell office:value-type="string" calcext:value-type="string">
            <text:p>./Named_entity_recognition/_old_file/data/translated_files/tlg0074/tlg003/tlg0074.tlg003.perseus-grc1_translated.x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  <dc:date>2026-06-24T18:14:35.095666652</dc:date>
    <meta:editing-duration>PT5H7M52S</meta:editing-duration>
    <meta:editing-cycles>2</meta:editing-cycles>
    <meta:document-statistic meta:table-count="2" meta:cell-count="987" meta:object-count="0"/>
  </office:meta>
</office:document-meta>
</file>